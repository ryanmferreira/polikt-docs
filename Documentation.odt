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CCECB129.png" manifest:media-type="image/png"/>
  <manifest:file-entry manifest:full-path="Pictures/10000001000005560000030022B37955.png" manifest:media-type="image/png"/>
  <manifest:file-entry manifest:full-path="Pictures/100000010000055600000300D26FFA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Cabeçalho_20_do_20_Sumário" style:master-page-name="MP0">
      <style:paragraph-properties fo:line-height="100%" fo:text-align="center" style:justify-single-word="false" style:page-number="auto" fo:break-before="page"/>
      <style:text-properties fo:color="#000000" loext:opacity="100%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2" style:family="paragraph" style:parent-style-name="Normal">
      <style:paragraph-properties fo:line-height="100%" fo:text-align="center" style:justify-single-word="false"/>
      <style:text-properties fo:color="#000000" loext:opacity="100%" style:font-name="Times New Roman" style:language-asian="pt" style:country-asian="BR" style:font-name-complex="Times New Roman"/>
    </style:style>
    <style:style style:name="P3" style:family="paragraph" style:parent-style-name="Normal">
      <style:paragraph-properties fo:line-height="100%" fo:text-align="center" style:justify-single-word="false"/>
      <style:text-properties fo:color="#000000" loext:opacity="100%" style:font-name="Times New Roman" fo:font-size="20pt" fo:font-weight="bold" style:font-size-asian="20pt" style:language-asian="pt" style:country-asian="BR" style:font-weight-asian="bold" style:font-name-complex="Times New Roman" style:font-size-complex="20pt" style:font-weight-complex="bold"/>
    </style:style>
    <style:style style:name="P4" style:family="paragraph" style:parent-style-name="Contents_20_Heading" style:master-page-name="MP1">
      <style:paragraph-properties fo:line-height="100%" fo:text-align="justify" style:justify-single-word="false" style:page-number="auto" fo:break-before="page"/>
      <style:text-properties fo:color="#000000" loext:opacity="100%" style:font-name="Times New Roman"/>
    </style:style>
    <style:style style:name="P5" style:family="paragraph" style:parent-style-name="Contents_20_1">
      <style:paragraph-properties fo:line-height="100%" fo:text-align="justify" style:justify-single-word="false">
        <style:tab-stops>
          <style:tab-stop style:position="18.45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 fo:line-height="100%" fo:text-align="justify" style:justify-single-word="false">
        <style:tab-stops>
          <style:tab-stop style:position="17.96cm" style:type="right" style:leader-style="dotted" style:leader-text="."/>
        </style:tab-stops>
      </style:paragraph-properties>
    </style:style>
    <style:style style:name="P7" style:family="paragraph" style:parent-style-name="Cabeçalho_20_do_20_Sumário">
      <style:paragraph-properties fo:line-height="100%" fo:text-align="justify" style:justify-single-word="false"/>
    </style:style>
    <style:style style:name="P8" style:family="paragraph" style:parent-style-name="Título_20_1" style:master-page-name="MP2">
      <style:paragraph-properties fo:line-height="100%" fo:text-align="justify" style:justify-single-word="false" style:page-number="auto" fo:break-before="page"/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Título_20_2">
      <style:paragraph-properties fo:line-height="100%" fo:text-align="justify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0" style:family="paragraph" style:parent-style-name="Normal">
      <style:paragraph-properties fo:line-height="100%" fo:text-align="justify" style:justify-single-word="false" fo:text-indent="1.249cm" style:auto-text-indent="false"/>
      <style:text-properties fo:color="#000000" loext:opacity="100%" style:font-name="Times New Roman" style:font-name-complex="Times New Roman"/>
    </style:style>
    <style:style style:name="P11" style:family="paragraph" style:parent-style-name="Normal">
      <style:paragraph-properties fo:line-height="100%" fo:text-align="justify" style:justify-single-word="false"/>
      <style:text-properties fo:color="#000000" loext:opacity="100%" style:font-name="Times New Roman" style:font-name-complex="Times New Roman"/>
    </style:style>
    <style:style style:name="P12" style:family="paragraph" style:parent-style-name="Text_20_body">
      <style:paragraph-properties fo:line-height="100%" fo:text-align="justify" style:justify-single-word="false"/>
      <style:text-properties fo:color="#000000" loext:opacity="100%" style:font-name="Times New Roman" style:font-name-complex="Times New Roman"/>
    </style:style>
    <style:style style:name="P13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Times New Roman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Text_20_body" style:list-style-name="L1">
      <style:paragraph-properties fo:line-height="10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Times New Roman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Text_20_body">
      <style:paragraph-properties fo:line-height="100%" fo:text-align="justify" style:justify-single-word="false" fo:text-indent="1.249cm" style:auto-text-indent="false"/>
      <style:text-properties fo:color="#000000" loext:opacity="100%" style:font-name="Times New Roman" style:font-name-complex="Times New Roman"/>
    </style:style>
    <style:style style:name="P16" style:family="paragraph" style:parent-style-name="Text_20_body">
      <style:paragraph-properties fo:line-height="100%" fo:text-align="justify" style:justify-single-word="false" fo:hyphenation-ladder-count="no-limit" fo:hyphenation-keep="auto" loext:hyphenation-keep-type="column" loext:hyphenation-keep-line="false"/>
      <style:text-properties fo:color="#000000" loext:opacity="100%" style:font-name="Times New Roman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Título_20_1" style:master-page-name="MP3">
      <style:paragraph-properties fo:line-height="100%" fo:text-align="justify" style:justify-single-word="false" style:page-number="auto" fo:break-before="page"/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8" style:family="paragraph" style:parent-style-name="Normal" style:list-style-name="L2">
      <style:paragraph-properties fo:line-height="100%" fo:text-align="justify" style:justify-single-word="false"/>
      <style:text-properties officeooo:paragraph-rsid="000f8e97"/>
    </style:style>
    <style:style style:name="P19" style:family="paragraph" style:parent-style-name="Heading_20_2">
      <style:paragraph-properties fo:line-height="100%" fo:text-align="justify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Heading_20_2">
      <style:paragraph-properties fo:line-height="100%" fo:text-align="justify" style:justify-single-word="false" fo:break-before="page"/>
      <style:text-properties style:font-name="Times New Roman" fo:font-size="14pt" style:font-size-asian="14pt" style:font-size-complex="14pt"/>
    </style:style>
    <style:style style:name="P21" style:family="paragraph" style:parent-style-name="Text_20_body">
      <style:paragraph-properties fo:line-height="100%" fo:text-align="justify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line-height="100%" fo:text-align="justify" style:justify-single-word="false"/>
      <style:text-properties style:font-name="Times New Roman" fo:font-size="12pt" fo:font-weight="normal" officeooo:paragraph-rsid="0012f48f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line-height="100%" fo:text-align="justify" style:justify-single-word="false"/>
      <style:text-properties style:font-name="Times New Roman" fo:font-size="12pt" fo:font-weight="bold" officeooo:paragraph-rsid="0012f48f" style:font-size-asian="10.5pt" style:font-weight-asian="bold" style:font-size-complex="12pt" style:font-weight-complex="bold"/>
    </style:style>
    <style:style style:name="P24" style:family="paragraph" style:parent-style-name="Título_20_1" style:master-page-name="MP4">
      <style:paragraph-properties fo:line-height="100%" fo:text-align="justify" style:justify-single-word="false" style:page-number="auto" fo:break-before="page"/>
      <style:text-properties fo:color="#000000" loext:opacity="100%" style:font-name="Times New Roman" fo:font-size="14pt" fo:font-weight="bold" officeooo:paragraph-rsid="001a4f8d" style:font-size-asian="14pt" style:font-weight-asian="bold" style:font-name-complex="Times New Roman" style:font-size-complex="14pt" style:font-weight-complex="bold"/>
    </style:style>
    <style:style style:name="P25" style:family="paragraph" style:parent-style-name="Normal">
      <style:paragraph-properties fo:line-height="100%" fo:text-align="justify" style:justify-single-word="false"/>
      <style:text-properties fo:color="#000000" loext:opacity="100%" style:font-name="Times New Roman" fo:font-size="14pt" fo:font-weight="bold" officeooo:paragraph-rsid="001a4f8d" style:font-size-asian="14pt" style:font-weight-asian="bold" style:font-name-complex="Times New Roman" style:font-size-complex="14pt" style:font-weight-complex="bold"/>
    </style:style>
    <style:style style:name="P26" style:family="paragraph" style:parent-style-name="Título_20_2">
      <style:paragraph-properties fo:line-height="100%" fo:text-align="justify" style:justify-single-word="false"/>
      <style:text-properties fo:color="#000000" loext:opacity="100%" style:font-name="Times New Roman" fo:font-size="14pt" fo:font-weight="bold" officeooo:paragraph-rsid="001a4f8d" style:font-size-asian="14pt" style:font-weight-asian="bold" style:font-name-complex="Times New Roman" style:font-size-complex="14pt" style:font-weight-complex="bold"/>
    </style:style>
    <style:style style:name="P27" style:family="paragraph" style:parent-style-name="Parágrafo_20_da_20_Lista" style:list-style-name="L3">
      <style:paragraph-properties fo:line-height="100%" fo:text-align="justify" style:justify-single-word="false"/>
      <style:text-properties fo:color="#000000" loext:opacity="100%" style:font-name="Times New Roman" fo:font-weight="normal" officeooo:paragraph-rsid="001a4f8d" style:font-weight-asian="normal" style:font-name-complex="Times New Roman" style:font-weight-complex="normal"/>
    </style:style>
    <style:style style:name="P28" style:family="paragraph" style:parent-style-name="Parágrafo_20_da_20_Lista" style:list-style-name="L3">
      <style:paragraph-properties fo:margin-left="0cm" fo:line-height="100%" fo:text-align="justify" style:justify-single-word="false" fo:text-indent="0cm" style:auto-text-indent="false"/>
      <style:text-properties fo:color="#000000" loext:opacity="100%" style:font-name="Times New Roman" fo:font-weight="normal" officeooo:paragraph-rsid="001a4f8d" style:font-weight-asian="normal" style:font-name-complex="Times New Roman" style:font-weight-complex="normal"/>
    </style:style>
    <style:style style:name="P29" style:family="paragraph" style:parent-style-name="Título_20_2">
      <style:paragraph-properties fo:line-height="100%" fo:text-align="justify" style:justify-single-word="false" fo:break-before="page"/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0" style:family="paragraph" style:parent-style-name="Parágrafo_20_da_20_Lista" style:list-style-name="L4">
      <style:paragraph-properties fo:line-height="100%" fo:text-align="justify" style:justify-single-word="false"/>
      <style:text-properties fo:color="#000000" loext:opacity="100%" style:font-name="Times New Roman" fo:font-weight="bold" style:font-weight-asian="bold" style:font-name-complex="Times New Roman" style:font-weight-complex="bold"/>
    </style:style>
    <style:style style:name="P31" style:family="paragraph" style:parent-style-name="Parágrafo_20_da_20_Lista" style:list-style-name="L4">
      <style:paragraph-properties fo:line-height="100%" fo:text-align="justify" style:justify-single-word="false"/>
      <style:text-properties fo:color="#000000" loext:opacity="100%" style:font-name="Times New Roman" style:font-name-complex="Times New Roman"/>
    </style:style>
    <style:style style:name="P32" style:family="paragraph" style:parent-style-name="Título_20_1" style:master-page-name="MP5">
      <style:paragraph-properties fo:line-height="100%" fo:text-align="justify" style:justify-single-word="false" style:page-number="auto" fo:break-before="page"/>
      <style:text-properties fo:color="#000000" loext:opacity="100%" style:font-name="Times New Roman" fo:font-size="14pt" style:text-underline-style="none" fo:font-weight="bold" style:font-size-asian="14pt" style:font-weight-asian="bold" style:font-name-complex="Times New Roman" style:font-size-complex="14pt" style:font-weight-complex="bold"/>
    </style:style>
    <style:style style:name="P33" style:family="paragraph" style:parent-style-name="Título_20_2">
      <style:paragraph-properties fo:line-height="100%" fo:text-align="left" style:justify-single-word="false"/>
    </style:style>
    <style:style style:name="P34" style:family="paragraph" style:parent-style-name="Normal">
      <style:paragraph-properties fo:line-height="100%" fo:text-align="justify" style:justify-single-word="false"/>
    </style:style>
    <style:style style:name="P35" style:family="paragraph" style:parent-style-name="Normal" style:list-style-name="L5">
      <style:paragraph-properties fo:line-height="100%" fo:text-align="left" style:justify-single-word="false"/>
    </style:style>
    <style:style style:name="P36" style:family="paragraph" style:parent-style-name="Título_20_1" style:master-page-name="MP6">
      <style:paragraph-properties fo:line-height="100%" fo:text-align="justify" style:justify-single-word="false" style:page-number="auto" fo:break-before="page"/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weight="bold" style:font-weight-asian="bold" style:font-name-complex="Times New Roman" style:font-weight-complex="bold"/>
    </style:style>
    <style:style style:name="T3" style:family="text">
      <style:text-properties officeooo:rsid="000ec9af"/>
    </style:style>
    <style:style style:name="T4" style:family="text">
      <style:text-properties fo:color="#000000" loext:opacity="100%" style:font-name="Times New Roman" officeooo:rsid="000f8e97" style:font-name-complex="Times New Roman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a4f8d"/>
    </style:style>
    <style:style style:name="T7" style:family="text">
      <style:text-properties officeooo:rsid="00179d16"/>
    </style:style>
    <style:style style:name="T8" style:family="text">
      <style:text-properties fo:color="#000000" loext:opacity="100%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Times New Roman" fo:font-size="12pt" style:text-underline-style="none" style:font-size-asian="12pt" style:font-size-complex="12pt"/>
    </style:style>
    <style:style style:name="T10" style:family="text">
      <style:text-properties fo:color="#000000" loext:opacity="100%" style:font-name="Times New Roman" fo:font-size="14pt" style:text-underline-style="none" fo:font-weight="bold" officeooo:rsid="000b6430" style:font-size-asian="14pt" style:font-weight-asian="bold" style:font-size-complex="14pt" style:font-weight-complex="bold"/>
    </style:style>
    <style:style style:name="T11" style:family="text">
      <style:text-properties fo:color="#000000" loext:opacity="100%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color="#2a6099" loext:opacity="100%" style:font-name="Times New Roman" fo:font-size="12pt" style:text-underline-style="none" style:font-size-asian="12pt" style:font-size-complex="12pt"/>
    </style:style>
    <style:style style:name="T13" style:family="text">
      <style:text-properties fo:color="#000000" loext:opacity="100%" style:font-name="Times New Roman" style:font-name-complex="Times New Roman"/>
    </style:style>
    <style:style style:name="T14" style:family="text">
      <style:text-properties fo:color="#2a6099" loext:opacity="100%" style:font-name="Times New Roman" style:font-name-complex="Times New Roman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1" style:wrap-contour="fals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TEC ITU – DOM AMAURY CASTANHO</text:p>
      <text:p text:style-name="P2"/>
      <text:p text:style-name="P2"/>
      <text:p text:style-name="P2"/>
      <text:p text:style-name="P2"/>
      <text:p text:style-name="P2">Miguel Fredo</text:p>
      <text:p text:style-name="P2">Moisés Lima</text:p>
      <text:p text:style-name="P2">Murilo Andrade</text:p>
      <text:p text:style-name="P2">Pedro Aguiar</text:p>
      <text:p text:style-name="P2">Ryan Ferreira</text:p>
      <text:p text:style-name="P2"/>
      <text:p text:style-name="P2"/>
      <text:p text:style-name="P2"/>
      <text:p text:style-name="P2"/>
      <text:p text:style-name="P2"/>
      <text:p text:style-name="P3">CONSCIÊNCIA POLÍTICA E CIDADANIA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4">Sumário</text:p>
          </text:index-title>
          <text:p text:style-name="P5"><text:a xlink:type="simple" xlink:href="#__RefHeading___Toc2073_3247793332" office:name="1. INTRODUÇÃO" text:style-name="Index_20_Link" text:visited-style-name="Index_20_Link"><text:span text:style-name="T1">1. INTRODUÇÃO<text:tab/>3</text:span></text:a></text:p>
          <text:p text:style-name="P6"><text:a xlink:type="simple" xlink:href="#__RefHeading___Toc2075_3247793332" office:name="1.1 CONTEXTO" text:style-name="Index_20_Link" text:visited-style-name="Index_20_Link"><text:span text:style-name="T1">1.1 CONTEXTO<text:tab/>3</text:span></text:a></text:p>
          <text:p text:style-name="P6"><text:a xlink:type="simple" xlink:href="#__RefHeading___Toc2077_3247793332" office:name="1.2 PROBLEMA" text:style-name="Index_20_Link" text:visited-style-name="Index_20_Link"><text:span text:style-name="T1">1.2 PROBLEMA<text:tab/>3</text:span></text:a></text:p>
          <text:p text:style-name="P6"><text:a xlink:type="simple" xlink:href="#__RefHeading___Toc2079_3247793332" office:name="1.3 OBJETIVO" text:style-name="Index_20_Link" text:visited-style-name="Index_20_Link"><text:span text:style-name="T1">1.3 OBJETIVO<text:tab/>3</text:span></text:a></text:p>
          <text:p text:style-name="P6"><text:a xlink:type="simple" xlink:href="#__RefHeading___Toc2081_3247793332" office:name="1.4 JUSTIFICATIVA" text:style-name="Index_20_Link" text:visited-style-name="Index_20_Link"><text:span text:style-name="T1">1.4 JUSTIFICATIVA<text:tab/>3</text:span></text:a></text:p>
          <text:p text:style-name="P5"><text:a xlink:type="simple" xlink:href="#__RefHeading___Toc2083_3247793332" office:name="2. PROJETO" text:style-name="Index_20_Link" text:visited-style-name="Index_20_Link"><text:span text:style-name="T1">2. PROJETO<text:tab/>4</text:span></text:a></text:p>
          <text:p text:style-name="P6"><text:a xlink:type="simple" xlink:href="#__RefHeading___Toc2085_3247793332" office:name="2.1 TÉCNICAS DE LEVANTAMENTO DE REQUISITOS" text:style-name="Index_20_Link" text:visited-style-name="Index_20_Link"><text:span text:style-name="T1">2.1 TÉCNICAS DE LEVANTAMENTO DE REQUISITOS<text:tab/>4</text:span></text:a></text:p>
          <text:p text:style-name="P6"><text:a xlink:type="simple" xlink:href="#__RefHeading___Toc2087_3247793332" office:name="2.2 ANÁLISE DE SIMILARES" text:style-name="Index_20_Link" text:visited-style-name="Index_20_Link"><text:span text:style-name="T1">2.2 ANÁLISE DE SIMILARES<text:tab/>4</text:span></text:a></text:p>
          <text:p text:style-name="P5"><text:a xlink:type="simple" xlink:href="#__RefHeading___Toc2089_3247793332" office:name="3. REQUISITOS" text:style-name="Index_20_Link" text:visited-style-name="Index_20_Link"><text:span text:style-name="T1">3. REQUISITOS<text:tab/>5</text:span></text:a></text:p>
          <text:p text:style-name="P6"><text:a xlink:type="simple" xlink:href="#__RefHeading___Toc2091_3247793332" office:name="3.1 REQUISITOS FUNCIONAIS (RF)" text:style-name="Index_20_Link" text:visited-style-name="Index_20_Link"><text:span text:style-name="T1">3.1 REQUISITOS FUNCIONAIS (RF)<text:tab/>5</text:span></text:a></text:p>
          <text:p text:style-name="P6"><text:a xlink:type="simple" xlink:href="#__RefHeading___Toc2093_3247793332" office:name="3.2 REQUISITOS NÃO FUNCIONAIS (RNF)" text:style-name="Index_20_Link" text:visited-style-name="Index_20_Link"><text:span text:style-name="T1">3.2 REQUISITOS NÃO FUNCIONAIS (RNF)<text:tab/>6</text:span></text:a></text:p>
          <text:p text:style-name="P5"><text:a xlink:type="simple" xlink:href="#__RefHeading___Toc2095_3247793332" office:name="4. ANEXOS" text:style-name="Index_20_Link" text:visited-style-name="Index_20_Link"><text:span text:style-name="T1">4. ANEXOS<text:tab/>7</text:span></text:a></text:p>
          <text:p text:style-name="P6"><text:a xlink:type="simple" xlink:href="#__RefHeading___Toc2097_3247793332" office:name="ANEXO A – FORMULÁRIO PARA LEVANTAMENTO DE INFORMAÇÕES" text:style-name="Index_20_Link" text:visited-style-name="Index_20_Link"><text:span text:style-name="T1">ANEXO A – FORMULÁRIO PARA LEVANTAMENTO DE INFORMAÇÕES<text:tab/>7</text:span></text:a></text:p>
          <text:p text:style-name="P5"><text:a xlink:type="simple" xlink:href="#__RefHeading___Toc2099_3247793332" office:name="5. REFERÊNCIAS" text:style-name="Index_20_Link" text:visited-style-name="Index_20_Link"><text:span text:style-name="T1">5. REFERÊNCIAS<text:tab/>8</text:span></text:a></text:p>
        </text:index-body>
      </text:table-of-content>
      <text:p text:style-name="P7"><text:span text:style-name="Fonte_20_parág._20_padrão"><text:span text:style-name="T2"/></text:span></text:p>
      <text:h text:style-name="P8" text:outline-level="1"><text:bookmark-start text:name="__RefHeading___Toc2073_3247793332"/><text:bookmark-start text:name="_Toc224918365"/>1. INTRODUÇÃO<text:bookmark-end text:name="__RefHeading___Toc2073_3247793332"/><text:bookmark-end text:name="_Toc224918365"/></text:h>
      <text:h text:style-name="P9" text:outline-level="2"><text:bookmark-start text:name="__RefHeading___Toc2075_3247793332"/><text:bookmark-start text:name="_Toc224918366"/>1.1 CONTEXTO<text:bookmark-end text:name="__RefHeading___Toc2075_3247793332"/><text:bookmark-end text:name="_Toc224918366"/></text:h>
      <text:p text:style-name="P10">O projeto surge em um ano eleitoral, período este em que decisões políticas ganham maior visibilidade e maior impacto direto na vida da população. Nesse cenário, se torna fundamental promover o acesso à informação de forma simples, acessível e digital.</text:p>
      <text:p text:style-name="P11"/>
      <text:h text:style-name="P9" text:outline-level="2"><text:bookmark-start text:name="__RefHeading___Toc2077_3247793332"/><text:bookmark-start text:name="_Toc224918367"/>1.2 PROBLEMA<text:bookmark-end text:name="__RefHeading___Toc2077_3247793332"/><text:bookmark-end text:name="_Toc224918367"/></text:h>
      <text:p text:style-name="P10">Observa-se que jovens entre 16 e 22 anos (eleitores iniciantes e cidadãos em formação) <text:span text:style-name="T3">não </text:span>possuem o conhecimento necessário sobre o funcionamento do sistema político e os mecanismos de exercício da cidadania, muitas vezes devido à linguagem técnica e conteúdos densos.</text:p>
      <text:p text:style-name="P11"/>
      <text:h text:style-name="P9" text:outline-level="2"><text:bookmark-start text:name="__RefHeading___Toc2079_3247793332"/><text:bookmark-start text:name="_Toc224918368"/>1.3 OBJETIVO<text:bookmark-end text:name="__RefHeading___Toc2079_3247793332"/><text:bookmark-end text:name="_Toc224918368"/></text:h>
      <text:p text:style-name="P12">Diante disso, o projeto tem como objetivo desenvolver uma solução que:</text:p>
      <text:list text:style-name="L1">
        <text:list-item>
          <text:p text:style-name="P13">Conscientize o público sobre os cargos políticos e suas respectivas funções; </text:p>
        </text:list-item>
        <text:list-item>
          <text:p text:style-name="P13">Explique direitos e deveres do cidadão; </text:p>
        </text:list-item>
        <text:list-item>
          <text:p text:style-name="P13">Oriente sobre como abrir solicitações junto a órgãos públicos; </text:p>
        </text:list-item>
        <text:list-item>
          <text:p text:style-name="P14">Ensine como denunciar irregularidades e acompanhar demandas; </text:p>
        </text:list-item>
      </text:list>
      <text:p text:style-name="P11"/>
      <text:h text:style-name="P9" text:outline-level="2"><text:bookmark-start text:name="__RefHeading___Toc2081_3247793332"/><text:bookmark-start text:name="_Toc224918369"/>1.4 JUSTIFICATIVA<text:bookmark-end text:name="__RefHeading___Toc2081_3247793332"/><text:bookmark-end text:name="_Toc224918369"/></text:h>
      <text:p text:style-name="P15">O acesso à informação de qualidade é essencial para decisões conscientes, ainda mais em anos eleitorais. A falta de conhecimento político pode resultar em escolhas desinformadas, baixa participação social - no caso, se refere à jovens de 16~18 anos que às vezes não exercem seu direito de voto por falta de conhecimento - e dificuldade na cobrança por direitos.</text:p>
      <text:p text:style-name="P16"><text:tab/>Assim, o projeto se justifica pela necessidade de fortalecer a educação política e contribuir para a formação de cidadãos mais participativos e informados na construção de uma sociedade mais funcional.</text:p>
      <text:p text:style-name="P11"/>
      <text:h text:style-name="P17" text:outline-level="1"><text:bookmark-start text:name="__RefHeading___Toc2083_3247793332"/><text:bookmark-start text:name="_Toc224918370"/>2. PROJETO<text:bookmark-end text:name="__RefHeading___Toc2083_3247793332"/><text:bookmark-end text:name="_Toc224918370"/></text:h>
      <text:h text:style-name="P9" text:outline-level="2"><text:bookmark-start text:name="__RefHeading___Toc2085_3247793332"/><text:bookmark-start text:name="_Toc224918371"/>2.1 TÉCNICAS DE LEVANTAMENTO DE REQUISITOS<text:bookmark-end text:name="__RefHeading___Toc2085_3247793332"/><text:bookmark-end text:name="_Toc224918371"/></text:h>
      <text:list text:style-name="L2">
        <text:list-item>
          <text:p text:style-name="P18"><text:span text:style-name="Fonte_20_parág._20_padrão"><text:span text:style-name="T4">Pesquisa Quantitativa (Questionário): Aplicação de formulário estruturado com respondentes do público-alvo (16-22 anos) para validação de dor e interesse.</text:span></text:span></text:p>
        </text:list-item>
        <text:list-item>
          <text:p text:style-name="P18"><text:span text:style-name="Fonte_20_parág._20_padrão"><text:span text:style-name="T4">Análise de Documentos: Estudo da legislação eleitoral e manuais de transparência pública para basear o "Tradutor de Notícias".</text:span></text:span></text:p>
        </text:list-item>
      </text:list>
      <text:p text:style-name="P19"/>
      <text:p text:style-name="P20"><text:bookmark-start text:name="__RefHeading___Toc2087_3247793332"/><text:bookmark-start text:name="_Toc224918372"/>2.2 ANÁLISE DE SIMILARES<text:bookmark-end text:name="__RefHeading___Toc2087_3247793332"/><text:bookmark-end text:name="_Toc224918372"/></text:p>
      <text:p text:style-name="P21"><text:tab/>Para o desenvolvimento do projeto, foram analisadas quatro plataformas que atuam no cenário de cidadania e política, identificando seus focos e limitações:</text:p>
      <text:p text:style-name="P22"><text:span text:style-name="T5">Politize! </text:span><text:span text:style-name="T5">(Educação): </text:span>Possui foco em educação política com a vantagem de utilizar uma linguagem simples e didática . Entretanto, apresenta a desvantagem de poder parecer denso ou excessivamente “escolar” para o público jovem.</text:p>
      <text:p text:style-name="P23"><draw:frame draw:style-name="fr1" draw:name="Image1" text:anchor-type="as-char" svg:y="-5.119cm" svg:width="16cm" svg:height="8.994cm" draw:z-index="0"><draw:image xlink:href="Pictures/100000010000055600000300D26FFAB5.png" xlink:type="simple" xlink:show="embed" xlink:actuate="onLoad" draw:mime-type="image/png"/></draw:frame></text:p>
      <text:p text:style-name="P22"><text:span text:style-name="T5">Ranking </text:span><text:span text:style-name="T5">(Fiscalização): </text:span><text:s/>Focado na fiscalização de políticos através de notas, votos e histórico de corrupção . Como pontos negativos, apresenta <text:span text:style-name="T6">algumas </text:span>métricas insuficientes e diversos problemas técnicos na plataforma <draw:frame draw:style-name="fr2" draw:name="Image2" text:anchor-type="as-char" svg:y="-3.344cm" svg:width="16cm" svg:height="8.994cm" draw:z-index="1"><draw:image xlink:href="Pictures/10000001000005560000030022B37955.png" xlink:type="simple" xlink:show="embed" xlink:actuate="onLoad" draw:mime-type="image/png"/></draw:frame></text:p>
      <text:p text:style-name="P21"><text:soft-page-break/><text:span text:style-name="T5">Colab (Zeladoria): </text:span>Plataforma voltada para o relato de problemas urbanos (zeladoria) . Suas principais desvantagens são a baixa adesão, interface confusa e a falta de parceria direta com prefeituras</text:p>
      <text:p text:style-name="P21">[Inserir Print do Colab – <text:span text:style-name="T7">Fora do Ar no Momento</text:span>]</text:p>
      <text:p text:style-name="P21"/>
      <text:p text:style-name="P21"><text:span text:style-name="T5">Participa+ (Consulta): </text:span>Canal oficial do governo para consultas públicas. Apesar da credibilidade, a plataforma é excessivamente burocrática para o usuário comum.</text:p>
      <text:p text:style-name="P21"><draw:frame draw:style-name="fr3" draw:name="Image3" text:anchor-type="as-char" svg:width="16cm" svg:height="8.994cm" draw:z-index="2"><draw:image xlink:href="Pictures/100000010000055600000300CCECB129.png" xlink:type="simple" xlink:show="embed" xlink:actuate="onLoad" draw:mime-type="image/png"/></draw:frame></text:p>
      <text:h text:style-name="P24" text:outline-level="1"><text:bookmark-start text:name="__RefHeading___Toc2089_3247793332"/><text:bookmark-start text:name="_Toc224918373"/>3. REQUISITOS<text:bookmark-end text:name="__RefHeading___Toc2089_3247793332"/><text:bookmark-end text:name="_Toc224918373"/></text:h>
      <text:p text:style-name="P25"/>
      <text:p text:style-name="P25"/>
      <text:h text:style-name="P26" text:outline-level="2"><text:bookmark-start text:name="__RefHeading___Toc2091_3247793332"/><text:bookmark-start text:name="_Toc224918374"/>3.1 REQUISITOS FUNCIONAIS (RF)<text:bookmark-end text:name="__RefHeading___Toc2091_3247793332"/><text:bookmark-end text:name="_Toc224918374"/></text:h>
      <text:list text:style-name="L3">
        <text:list-item>
          <text:p text:style-name="P27">RF01 - Feed Personalizado</text:p>
          <text:list>
            <text:list-item>
              <text:p text:style-name="P27">Origem e Contexto: Com base na burocracia observada no similar Participa+, é necessário um sistema que filtre informações para reduzir a complexidade.</text:p>
            </text:list-item>
            <text:list-item>
              <text:p text:style-name="P27">Descrição: O sistema deve exibir notícias filtradas por temas de interesse e localização, garantindo que o usuário receba informações pertinentes à sua região e preferências.</text:p>
            </text:list-item>
            <text:list-item>
              <text:p text:style-name="P27">Prioridade: Essencial.</text:p>
              <text:p text:style-name="P28"/>
            </text:list-item>
          </text:list>
        </text:list-item>
        <text:list-item>
          <text:p text:style-name="P27">RF02 – Tradutor de Notícias</text:p>
          <text:list>
            <text:list-item>
              <text:p text:style-name="P27">Origem e Contexto: Com base na preferência por linguagem simples identificada no formulário de pesquisa, é necessário um módulo que facilite a compreensão técnica.</text:p>
            </text:list-item>
            <text:list-item>
              <text:p text:style-name="P27">Descrição: Para cada notícia exibida, o sistema deve apresentar um resumo simplificado que explique, em linguagem clara, o impacto direto daquela informação no cotidiano do usuário.</text:p>
            </text:list-item>
            <text:list-item>
              <text:p text:style-name="P27">Prioridade: Essencial.</text:p>
              <text:p text:style-name="P28"/>
            </text:list-item>
          </text:list>
        </text:list-item>
        <text:list-item>
          <text:p text:style-name="P27">RF03 – Trilhas de Conhecimento</text:p>
          <text:list>
            <text:list-item>
              <text:p text:style-name="P27">Origem e Contexto: Com base na alta demanda por recursos visuais apontada no formulário, é necessário organizar o conteúdo de forma didática.</text:p>
            </text:list-item>
            <text:list-item>
              <text:p text:style-name="P27">Descrição: O sistema deve organizar o conteúdo didático em trilhas sequenciais, utilizando recursos visuais como infográficos e diagramas para facilitar a absorção do conteúdo.</text:p>
            </text:list-item>
            <text:list-item>
              <text:p text:style-name="P27">Prioridade: Essencial.</text:p>
              <text:p text:style-name="P28"/>
            </text:list-item>
          </text:list>
        </text:list-item>
        <text:list-item>
          <text:p text:style-name="P27">RF04 – Mural de Infraestrutura</text:p>
          <text:list>
            <text:list-item>
              <text:p text:style-name="P27">Origem e Contexto: Com base na baixa adesão de similares como o Colab, é necessário um espaço mais intuitivo para o engajamento do cidadão.</text:p>
            </text:list-item>
            <text:list-item>
              <text:p text:style-name="P27">Descrição: O usuário deve ter a capacidade de postar fotos e descrições detalhadas de problemas urbanos, integrando dados de localização automática.</text:p>
            </text:list-item>
            <text:list-item>
              <text:p text:style-name="P27">Prioridade: Importante.</text:p>
              <text:p text:style-name="P28"/>
            </text:list-item>
          </text:list>
        </text:list-item>
        <text:list-item>
          <text:p text:style-name="P27">RF05 – Guia de Denúncia</text:p>
          <text:list>
            <text:list-item>
              <text:p text:style-name="P27">Origem e Contexto: Com base no desconhecimento sobre como exercer a cidadania relatado no formulário, o sistema deve orientar o registro de queixas oficiais.</text:p>
            </text:list-item>
            <text:list-item>
              <text:p text:style-name="P27">Descrição: Ao selecionar um problema de infraestrutura, o aplicativo deve exibir um passo a passo detalhado indicando como e onde registrar a queixa oficial nos órgãos competentes.</text:p>
            </text:list-item>
            <text:list-item>
              <text:p text:style-name="P27">Prioridade: Essencial.</text:p>
              <text:p text:style-name="P28"/>
            </text:list-item>
          </text:list>
        </text:list-item>
        <text:list-item>
          <text:p text:style-name="P27"><text:soft-page-break/>RF06 – Busca e Filtros</text:p>
          <text:list>
            <text:list-item>
              <text:p text:style-name="P27">Origem e Contexto: Com base na interface confusa de similares como o Colab, é necessário facilitar o acesso aos dados relatados.</text:p>
            </text:list-item>
            <text:list-item>
              <text:p text:style-name="P27">Descrição: O sistema deve permitir que o usuário filtre os problemas relatados no mural por bairro, categoria de falha ou data de publicação.</text:p>
            </text:list-item>
            <text:list-item>
              <text:p text:style-name="P27">Prioridade: Importante.</text:p>
              <text:p text:style-name="P27"/>
            </text:list-item>
          </text:list>
        </text:list-item>
        <text:list-item>
          <text:p text:style-name="P27">RF07 – Perfil do Usuário</text:p>
          <text:list>
            <text:list-item>
              <text:p text:style-name="P27">Origem e Contexto: Com base no perfil de formação do público-alvo identificado no formulário, é necessário uma área para controle de progresso.</text:p>
            </text:list-item>
            <text:list-item>
              <text:p text:style-name="P27">Descrição: O sistema deve oferecer uma área personalizada onde o usuário possa salvar suas trilhas favoritas e acompanhar seu progresso de aprendizado.</text:p>
            </text:list-item>
            <text:list-item>
              <text:p text:style-name="P27">Prioridade: Desejável.</text:p>
            </text:list-item>
          </text:list>
        </text:list-item>
        <text:list-item>
          <text:p text:style-name="P27">RF08 – Notificações</text:p>
          <text:list>
            <text:list-item>
              <text:p text:style-name="P27">Origem e Contexto: Com base na falta de agilidade na comunicação do similar Participa+, é necessário manter o usuário atualizado em tempo real.</text:p>
            </text:list-item>
            <text:list-item>
              <text:p text:style-name="P27">Descrição: O sistema deve enviar alertas em tempo real sobre notícias de alto impacto ou atualizações relevantes nos guias de denúncia seguidos pelo usuário.</text:p>
            </text:list-item>
            <text:list-item>
              <text:p text:style-name="P27">Prioridade: Desejável.</text:p>
            </text:list-item>
          </text:list>
        </text:list-item>
        <text:list-item>
          <text:p text:style-name="P27">RF09 – Mecanismo de Feedback</text:p>
          <text:list>
            <text:list-item>
              <text:p text:style-name="P27">Origem e Contexto: Com base na percepção de dificuldade com conteúdos densos apontada no formulário, é necessário medir a clareza da informação.</text:p>
            </text:list-item>
            <text:list-item>
              <text:p text:style-name="P27">Descrição: O sistema deve permitir que o usuário avalie se uma informação governamental foi "Clara" ou "Confusa", para retornar um feedback de sua eficiência.</text:p>
            </text:list-item>
            <text:list-item>
              <text:p text:style-name="P27">Prioridade: Importante.</text:p>
            </text:list-item>
          </text:list>
        </text:list-item>
      </text:list>
      <text:h text:style-name="P29" text:outline-level="2"><text:bookmark-start text:name="__RefHeading___Toc2093_3247793332"/><text:bookmark-start text:name="_Toc224918375"/>3.2 REQUISITOS NÃO FUNCIONAIS (RNF)<text:bookmark-end text:name="__RefHeading___Toc2093_3247793332"/><text:bookmark-end text:name="_Toc224918375"/></text:h>
      <text:list text:style-name="L4">
        <text:list-item>
          <text:p text:style-name="P30">RNF01 - Usabilidade (UX)</text:p>
          <text:list>
            <text:list-item>
              <text:p text:style-name="P31">Descrição: A interface deve ser projetada de forma intuitiva e visualmente atraente para o público de 16 a 22 anos, evitando terminologias burocráticas ou estéticas excessivamente acadêmicas.</text:p>
            </text:list-item>
            <text:list-item>
              <text:p text:style-name="P31">Métrica: O usuário deve ser capaz de navegar entre as seções principais com no máximo 3 toques na tela.</text:p>
            </text:list-item>
            <text:list-item>
              <text:p text:style-name="P31">Prioridade: Essencial.</text:p>
            </text:list-item>
          </text:list>
        </text:list-item>
        <text:list-item>
          <text:p text:style-name="P30">RNF02 - Acessibilidade</text:p>
          <text:list>
            <text:list-item>
              <text:p text:style-name="P31">Descrição: O sistema deve ser compatível com ferramentas de leitura de tela e possuir esquemas de cores que garantam contraste adequado para usuários com baixa visão ou daltonismo.</text:p>
            </text:list-item>
            <text:list-item>
              <text:p text:style-name="P31">Prioridade: Essencial.</text:p>
            </text:list-item>
          </text:list>
        </text:list-item>
        <text:list-item>
          <text:p text:style-name="P30">RNF03 - Escalabilidade</text:p>
          <text:list>
            <text:list-item>
              <text:p text:style-name="P31">Descrição: A arquitetura do banco de dados e do servidor deve ser capaz de suportar um aumento repentino no volume de dados e acessos simultâneos, especialmente no Mural de Infraestrutura.</text:p>
            </text:list-item>
            <text:list-item>
              <text:p text:style-name="P31">Prioridade: Importante.</text:p>
            </text:list-item>
          </text:list>
        </text:list-item>
        <text:list-item>
          <text:p text:style-name="P30">RNF04 - Desempenho</text:p>
          <text:list>
            <text:list-item>
              <text:p text:style-name="P31">Descrição: O aplicativo deve manter sua funcionalidade central otimizada, garantindo carregamento rápido mesmo em dispositivos com hardware limitado ou conexões de rede 4G instáveis.</text:p>
            </text:list-item>
            <text:list-item>
              <text:p text:style-name="P31">Métrica: O tempo de carregamento da tela inicial e do feed não deve ultrapassar 3 segundos.</text:p>
            </text:list-item>
            <text:list-item>
              <text:p text:style-name="P31">Prioridade: Essencial.</text:p>
            </text:list-item>
          </text:list>
        </text:list-item>
      </text:list>
      <text:p text:style-name="P11"/>
      <text:h text:style-name="P32" text:outline-level="1"><text:bookmark-start text:name="__RefHeading___Toc2095_3247793332"/><text:bookmark-start text:name="_Toc224918376"/>4. ANEXOS<text:bookmark-end text:name="__RefHeading___Toc2095_3247793332"/><text:bookmark-end text:name="_Toc224918376"/></text:h>
      <text:h text:style-name="P33" text:outline-level="2"><text:bookmark-start text:name="_Toc224918377"/><text:bookmark-start text:name="__RefHeading___Toc2097_3247793332"/><text:span text:style-name="Fonte_20_parág._20_padrão"><text:span text:style-name="T8">ANEXO A –</text:span></text:span><text:span text:style-name="Hyperlink"><text:span text:style-name="T8"> FORMULÁRIO PARA LEVANTAMENTO DE INFORMAÇÕES</text:span></text:span><text:bookmark-end text:name="_Toc224918377"/><text:bookmark-end text:name="__RefHeading___Toc2097_3247793332"/></text:h>
      <text:p text:style-name="P34"><text:span text:style-name="Hyperlink"><text:span text:style-name="T9"><text:tab/>Pesquisa quantitativa realizada com jovens para validar o nível de conhecimento político e engajamento com zeladoria urbana. </text:span></text:span></text:p>
      <text:list text:style-name="L5">
        <text:list-item>
          <text:p text:style-name="P35"><text:span text:style-name="Hyperlink"><text:span text:style-name="T8">Link </text:span></text:span><text:span text:style-name="Hyperlink"><text:span text:style-name="T10">com os</text:span></text:span><text:span text:style-name="Hyperlink"><text:span text:style-name="T8"> resultados:</text:span></text:span><text:span text:style-name="Hyperlink"><text:span text:style-name="T11"> </text:span></text:span><text:a xlink:type="simple" xlink:href="https://docs.google.com/forms/d/1FjxiWPiAaYZQAxawRgJvHNZJJnKXRDofGvRVoFGj1YE/viewanalytics" text:style-name="Internet_20_link" text:visited-style-name="Visited_20_Internet_20_Link"><text:span text:style-name="Hyperlink"><text:span text:style-name="T12">https://docs.google.com/forms/d/1FjxiWPiAaYZQAxawRgJvHNZJJnKXRDofGvRVoFGj1YE/viewanalytics</text:span></text:span></text:a></text:p>
        </text:list-item>
      </text:list>
      <text:h text:style-name="P36" text:outline-level="1"><text:bookmark-start text:name="__RefHeading___Toc2099_3247793332"/><text:bookmark-start text:name="_Toc224918378"/>5. REFERÊNCIAS<text:bookmark-end text:name="__RefHeading___Toc2099_3247793332"/><text:bookmark-end text:name="_Toc224918378"/></text:h>
      <text:p text:style-name="P34"><text:span text:style-name="Fonte_20_parág._20_padrão"><text:span text:style-name="T13">POLITIZE! Portal de Educação Política. Disponível em: </text:span></text:span><text:a xlink:type="simple" xlink:href="https://www.politize.com.br/" office:target-frame-name="_top" xlink:show="replace" text:style-name="Internet_20_link" text:visited-style-name="Visited_20_Internet_20_Link"><text:span text:style-name="Hyperlink"><text:span text:style-name="T14">https://www.politize.com.br/</text:span></text:span></text:a><text:span text:style-name="Fonte_20_parág._20_padrão"><text:span text:style-name="T13">. Acesso em: 19 mar. 2026.</text:span></text:span></text:p>
      <text:p text:style-name="P34"><text:span text:style-name="Fonte_20_parág._20_padrão"><text:span text:style-name="T13">RANKING POLÍTICO. Comparador de atuação parlamentar. Disponível em: </text:span></text:span><text:span text:style-name="Hyperlink"><text:span text:style-name="T14">https://www.politicos.org.br/</text:span></text:span><text:span text:style-name="Fonte_20_parág._20_padrão"><text:span text:style-name="T13">. Acesso em: 19 mar. 2026.</text:span></text:span></text:p>
      <text:p text:style-name="P34"><text:span text:style-name="Fonte_20_parág._20_padrão"><text:span text:style-name="T13">COLAB. Plataforma de Zeladoria Urbana e Cidadania Digital. Disponível em: </text:span></text:span><text:a xlink:type="simple" xlink:href="https://www.colab.re/" office:target-frame-name="_top" xlink:show="replace" text:style-name="Internet_20_link" text:visited-style-name="Visited_20_Internet_20_Link"><text:span text:style-name="Hyperlink"><text:span text:style-name="T14">https://www.colab.re/</text:span></text:span></text:a><text:span text:style-name="Fonte_20_parág._20_padrão"><text:span text:style-name="T13">. Acesso em: 19 mar. 2026.</text:span></text:span></text:p>
      <text:p text:style-name="P34"><text:span text:style-name="Fonte_20_parág._20_padrão"><text:span text:style-name="T13">PARTICIPA+. Plataforma de participação social do Governo Federal. Disponível em: </text:span></text:span><text:a xlink:type="simple" xlink:href="https://www.gov.br/participamaisbrasil" office:target-frame-name="_top" xlink:show="replace" text:style-name="Internet_20_link" text:visited-style-name="Visited_20_Internet_20_Link"><text:span text:style-name="Hyperlink"><text:span text:style-name="T14">https://www.gov.br/participamaisbrasil</text:span></text:span></text:a><text:span text:style-name="Fonte_20_parág._20_padrão"><text:span text:style-name="T13">. Acesso em 19 mar. 2026.</text:span></text:span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 fo:hyphenation-keep="auto" loext:hyphenation-keep-type="column" loext:hyphenation-keep-line="false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ção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ção_20_Intensa" style:display-name="Citação Intens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loext:hyphenation-keep-line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Cabeçalho_20_do_20_Sumário" style:display-name="Cabeçalho do Sumário" style:family="paragraph" style:parent-style-name="Título_20_1" style:next-style-name="Normal" style:default-outline-level="" style:list-style-name="">
      <style:paragraph-properties fo:margin-top="0.423cm" fo:margin-bottom="0cm" style:contextual-spacing="false" fo:line-height="107%" fo:hyphenation-ladder-count="no-limit" fo:hyphenation-keep="auto" loext:hyphenation-keep-type="column" loext:hyphenation-keep-line="false"/>
      <style:text-properties fo:font-size="16pt" style:letter-kerning="false" style:font-size-asian="16pt" style:language-asian="pt" style:country-asian="BR" style:font-size-complex="16pt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 style:next-style-name="Normal" style:auto-update="true">
      <style:paragraph-properties fo:margin-top="0cm" fo:margin-bottom="0.176cm" style:contextual-spacing="false"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 style:next-style-name="Normal" style:auto-update="true">
      <style:paragraph-properties fo:margin-left="0.423cm" fo:margin-top="0cm" fo:margin-bottom="0.176cm" style:contextual-spacing="fals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har" style:display-name="Título 2 Char" style:family="text" style:parent-style-name="Fonte_20_parág._20_padrão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har" style:display-name="Título 3 Char" style:family="text" style:parent-style-name="Fonte_20_parág._20_padrão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har" style:display-name="Título 4 Char" style:family="text" style:parent-style-name="Fonte_20_parág._20_padrão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text" style:parent-style-name="Fonte_20_parág._20_padrão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har" style:display-name="Título 6 Char" style:family="text" style:parent-style-name="Fonte_20_parág._20_padrão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har" style:display-name="Título 7 Char" style:family="text" style:parent-style-name="Fonte_20_parág._20_padrão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har" style:display-name="Título 8 Char" style:family="text" style:parent-style-name="Fonte_20_parág._20_padrão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har" style:display-name="Título 9 Char" style:family="text" style:parent-style-name="Fonte_20_parág._20_padrão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har" style:display-name="Título Char" style:family="text" style:parent-style-name="Fonte_20_parág._20_padrão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har" style:display-name="Subtítulo Char" style:family="text" style:parent-style-name="Fonte_20_parág._20_padrão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ção_20_Char" style:display-name="Citação Char" style:family="text" style:parent-style-name="Fonte_20_parág._20_padrão">
      <style:text-properties fo:color="#404040" loext:opacity="100%" fo:font-style="italic" style:font-style-asian="italic" style:font-style-complex="italic"/>
    </style:style>
    <style:style style:name="Ênfase_20_Intensa" style:display-name="Ênfase Intensa" style:family="text" style:parent-style-name="Fonte_20_parág._20_padrão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Fonte_20_parág._20_padrão">
      <style:text-properties fo:color="#0f4761" loext:opacity="100%" fo:font-style="italic" style:font-style-asian="italic" style:font-style-complex="italic"/>
    </style:style>
    <style:style style:name="Referência_20_Intensa" style:display-name="Referência Intensa" style:family="text" style:parent-style-name="Fonte_20_parág._20_padrão">
      <style:text-properties fo:font-variant="small-caps" fo:color="#0f4761" loext:opacity="100%" fo:letter-spacing="0.009cm" fo:font-weight="bold" style:font-weight-asian="bold" style:font-weight-complex="bold"/>
    </style:style>
    <style:style style:name="Hyperlink" style:family="text" style:parent-style-name="Fonte_20_parág._20_padrão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156082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Rodapé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MP2" style:family="paragraph" style:parent-style-name="Rodapé">
      <style:paragraph-properties fo:text-align="righ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Itu, 2026</text:p>
      </style:footer>
    </style:master-page>
    <style:master-page style:name="MP1" style:page-layout-name="Mpm3" draw:style-name="Mdp1">
      <style:footer>
        <text:p text:style-name="Rodapé"/>
      </style:footer>
      <style:footer-left>
        <text:p text:style-name="MP2"/>
      </style:footer-left>
    </style:master-page>
    <style:master-page style:name="MP2" style:page-layout-name="Mpm4" draw:style-name="Mdp1">
      <style:footer>
        <text:p text:style-name="MP2"><text:bookmark-start text:name="PageNumWizard_FOOTER_MP23"/><text:page-number text:select-page="current">3</text:page-number><text:bookmark-end text:name="PageNumWizard_FOOTER_MP23"/></text:p>
      </style:footer>
      <style:footer-left>
        <text:p text:style-name="Rodapé"/>
      </style:footer-left>
    </style:master-page>
    <style:master-page style:name="MP3" style:page-layout-name="Mpm4" draw:style-name="Mdp1">
      <style:footer>
        <text:p text:style-name="Rodapé"/>
      </style:footer>
      <style:footer-left>
        <text:p text:style-name="MP2"><text:bookmark-start text:name="PageNumWizard_FOOTER_MP34"/><text:page-number text:select-page="current">6</text:page-number><text:bookmark-end text:name="PageNumWizard_FOOTER_MP34"/></text:p>
      </style:footer-left>
    </style:master-page>
    <style:master-page style:name="MP4" style:page-layout-name="Mpm4" draw:style-name="Mdp1">
      <style:footer>
        <text:p text:style-name="MP2"><text:bookmark-start text:name="PageNumWizard_FOOTER_MP45"/><text:page-number text:select-page="current">9</text:page-number><text:bookmark-end text:name="PageNumWizard_FOOTER_MP45"/></text:p>
      </style:footer>
      <style:footer-left>
        <text:p text:style-name="MP2"><text:bookmark-start text:name="PageNumWizard_FOOTER_MP46 Copy 1"/><text:bookmark-start text:name="PageNumWizard_FOOTER_MP46"/><text:page-number text:select-page="current">8</text:page-number><text:bookmark-end text:name="PageNumWizard_FOOTER_MP46 Copy 1"/><text:bookmark-end text:name="PageNumWizard_FOOTER_MP46"/></text:p>
      </style:footer-left>
    </style:master-page>
    <style:master-page style:name="MP5" style:page-layout-name="Mpm4" draw:style-name="Mdp1">
      <style:footer>
        <text:p text:style-name="MP2"><text:bookmark-start text:name="PageNumWizard_FOOTER_MP57"/><text:page-number text:select-page="current">9</text:page-number><text:bookmark-end text:name="PageNumWizard_FOOTER_MP57"/></text:p>
      </style:footer>
      <style:footer-left>
        <text:p text:style-name="Rodapé"/>
      </style:footer-left>
    </style:master-page>
    <style:master-page style:name="MP6" style:page-layout-name="Mpm4" draw:style-name="Mdp1">
      <style:footer>
        <text:p text:style-name="Rodapé"/>
      </style:footer>
      <style:footer-left>
        <text:p text:style-name="MP2"><text:bookmark-start text:name="PageNumWizard_FOOTER_MP68"/><text:page-number text:select-page="current">10</text:page-number><text:bookmark-end text:name="PageNumWizard_FOOTER_MP68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42d76a33568d9a37e1fc00c3228d3881e2f8df73</meta:generator>
    <dc:title/>
    <dc:description/>
    <dc:subject/>
    <meta:initial-creator>new_user</meta:initial-creator>
    <dc:creator>Ryan Ferreira</dc:creator>
    <meta:creation-date>2026-03-20T19:56:00Z</meta:creation-date>
    <dc:date>2026-04-06T11:16:00.847320692</dc:date>
    <meta:print-date>2026-04-06T10:58:48.385107691</meta:print-date>
    <meta:editing-cycles>23</meta:editing-cycles>
    <meta:editing-duration>PT1H43M57S</meta:editing-duration>
    <meta:printed-by>PDF files: Ryan Ferreira</meta:printed-by>
    <meta:document-statistic meta:table-count="0" meta:image-count="3" meta:object-count="0" meta:page-count="11" meta:paragraph-count="124" meta:word-count="1305" meta:character-count="8562" meta:non-whitespace-character-count="7414"/>
    <meta:template xlink:type="simple" xlink:actuate="onRequest" xlink:title="" xlink:href="Normal.dotm"/>
  </office:meta>
</office:document-meta>
</file>